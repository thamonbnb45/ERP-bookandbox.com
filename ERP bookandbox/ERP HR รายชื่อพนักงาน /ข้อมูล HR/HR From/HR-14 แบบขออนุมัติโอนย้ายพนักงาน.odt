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Angsana New" svg:font-family="Angsana New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7" style:parent-style-name="DefaultParagraphFont" style:family="text">
      <style:text-properties fo:font-size="14pt" style:font-size-asian="14pt"/>
    </style:style>
    <style:style style:name="P8" style:parent-style-name="Standard" style:family="paragraph">
      <style:paragraph-properties fo:text-align="center" fo:margin-bottom="0.25in"/>
    </style:style>
    <style:style style:name="T9" style:parent-style-name="ฟอนต์ของย่อหน้าเริ่มต้น" style:family="text">
      <style:text-properties style:font-name="Angsana New" fo:font-size="20pt" style:font-size-asian="20pt" style:font-size-complex="20pt" style:script-type="complex"/>
    </style:style>
    <style:style style:name="T10" style:parent-style-name="ฟอนต์ของย่อหน้าเริ่มต้น" style:family="text">
      <style:text-properties style:font-name="Angsana New" fo:font-size="15pt" style:font-size-asian="15pt" style:font-size-complex="15pt" style:text-underline-type="single" style:text-underline-style="solid" style:text-underline-width="auto" style:text-underline-mode="continuous" style:script-type="complex"/>
    </style:style>
    <style:style style:name="T11" style:parent-style-name="ฟอนต์ของย่อหน้าเริ่มต้น" style:family="text">
      <style:text-properties style:font-name="Angsana New" fo:font-size="15pt" style:font-size-asian="15pt" style:font-size-complex="15pt" style:script-type="complex"/>
    </style:style>
    <style:style style:name="P12" style:parent-style-name="Standard" style:family="paragraph">
      <style:paragraph-properties fo:margin-bottom="0.0833in"/>
    </style:style>
    <style:style style:name="T13" style:parent-style-name="ฟอนต์ของย่อหน้าเริ่มต้น" style:family="text">
      <style:text-properties style:font-name="Angsana New" fo:font-size="15pt" style:font-size-asian="15pt" style:font-size-complex="15pt" style:script-type="complex"/>
    </style:style>
    <style:style style:name="T14" style:parent-style-name="ฟอนต์ของย่อหน้าเริ่มต้น" style:family="text">
      <style:text-properties style:font-name="Angsana New" fo:font-size="15pt" style:font-size-asian="15pt" style:font-size-complex="15pt" style:text-underline-type="single" style:text-underline-style="solid" style:text-underline-width="auto" style:text-underline-mode="continuous" style:script-type="complex"/>
    </style:style>
    <style:style style:name="T15" style:parent-style-name="ฟอนต์ของย่อหน้าเริ่มต้น" style:family="text">
      <style:text-properties style:font-name="Angsana New" fo:font-size="15pt" style:font-size-asian="15pt" style:font-size-complex="15pt" style:script-type="complex"/>
    </style:style>
    <style:style style:name="T16" style:parent-style-name="ฟอนต์ของย่อหน้าเริ่มต้น" style:family="text">
      <style:text-properties style:font-name="Angsana New" fo:font-size="15pt" style:font-size-asian="15pt" style:font-size-complex="15pt" style:script-type="complex"/>
    </style:style>
    <style:style style:name="T17" style:parent-style-name="ฟอนต์ของย่อหน้าเริ่มต้น" style:family="text">
      <style:text-properties style:font-name="Angsana New" fo:font-size="15pt" style:font-size-asian="15pt" style:font-size-complex="15pt" style:script-type="complex"/>
    </style:style>
    <style:style style:name="T18" style:parent-style-name="ฟอนต์ของย่อหน้าเริ่มต้น" style:family="text">
      <style:text-properties style:font-name="Angsana New" fo:font-size="15pt" style:font-size-asian="15pt" style:font-size-complex="15pt" style:script-type="complex"/>
    </style:style>
    <style:style style:name="T19" style:parent-style-name="ฟอนต์ของย่อหน้าเริ่มต้น" style:family="text">
      <style:text-properties style:font-name="Angsana New" fo:font-size="15pt" style:font-size-asian="15pt" style:font-size-complex="15pt"/>
    </style:style>
    <style:style style:name="T20" style:parent-style-name="ฟอนต์ของย่อหน้าเริ่มต้น" style:family="text">
      <style:text-properties style:font-name="Angsana New" fo:font-size="15pt" style:font-size-asian="15pt" style:font-size-complex="15pt" style:script-type="complex"/>
    </style:style>
    <style:style style:name="T21" style:parent-style-name="ฟอนต์ของย่อหน้าเริ่มต้น" style:family="text">
      <style:text-properties style:font-name="Angsana New" fo:font-weight="bold" style:font-weight-asian="bold" style:font-weight-complex="bold" fo:font-size="15pt" style:font-size-asian="15pt" style:font-size-complex="15pt" style:script-type="complex"/>
    </style:style>
    <style:style style:name="T22" style:parent-style-name="ฟอนต์ของย่อหน้าเริ่มต้น" style:family="text">
      <style:text-properties style:font-name="Angsana New" fo:font-size="15pt" style:font-size-asian="15pt" style:font-size-complex="15pt" style:script-type="complex"/>
    </style:style>
    <style:style style:name="P23" style:parent-style-name="Standard" style:family="paragraph">
      <style:text-properties style:font-name="Angsana New" fo:font-size="15pt" style:font-size-asian="15pt" style:font-size-complex="15pt"/>
    </style:style>
    <style:style style:name="TableColumn25" style:family="table-column">
      <style:table-column-properties style:column-width="3.3465in" style:use-optimal-column-width="false"/>
    </style:style>
    <style:style style:name="TableColumn26" style:family="table-column">
      <style:table-column-properties style:column-width="3.3465in" style:use-optimal-column-width="false"/>
    </style:style>
    <style:style style:name="Table24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30" style:parent-style-name="ฟอนต์ของย่อหน้าเริ่มต้น" style:family="text">
      <style:text-properties style:font-name="Angsana New" fo:font-size="15pt" style:font-size-asian="15pt" style:font-size-complex="15pt" style:script-type="complex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33" style:parent-style-name="ฟอนต์ของย่อหน้าเริ่มต้น" style:family="text">
      <style:text-properties style:font-name="Angsana New" fo:font-size="15pt" style:font-size-asian="15pt" style:font-size-complex="15pt" style:script-type="complex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37" style:parent-style-name="DefaultParagraphFont" style:family="text">
      <style:text-properties style:font-name="Angsana New" fo:font-size="14pt" style:font-size-asian="14pt" style:font-size-complex="14pt" style:script-type="complex"/>
    </style:style>
    <style:style style:name="P38" style:parent-style-name="TableContents" style:family="paragraph">
      <style:paragraph-properties fo:text-align="center"/>
    </style:style>
    <style:style style:name="T39" style:parent-style-name="DefaultParagraphFont" style:family="text">
      <style:text-properties style:font-name="Angsana New" fo:font-size="14pt" style:font-size-asian="14pt" style:font-size-complex="14pt" style:script-type="complex"/>
    </style:style>
    <style:style style:name="T40" style:parent-style-name="ฟอนต์ของย่อหน้าเริ่มต้น" style:family="text">
      <style:text-properties style:font-name="Angsana New" fo:font-size="14pt" style:font-size-asian="14pt" style:font-size-complex="14pt"/>
    </style:style>
    <style:style style:name="T41" style:parent-style-name="ฟอนต์ของย่อหน้าเริ่มต้น" style:family="text">
      <style:text-properties style:font-name="Angsana New" fo:font-size="14pt" style:font-size-asian="14pt" style:font-size-complex="14pt"/>
    </style:style>
    <style:style style:name="T42" style:parent-style-name="ฟอนต์ของย่อหน้าเริ่มต้น" style:family="text">
      <style:text-properties style:font-name="Angsana New" fo:font-size="14pt" style:font-size-asian="14pt" style:font-size-complex="14pt" style:script-type="complex"/>
    </style:style>
    <style:style style:name="P43" style:parent-style-name="TableContents" style:family="paragraph">
      <style:paragraph-properties fo:text-align="center"/>
      <style:text-properties style:font-name="Angsana New" fo:font-size="14pt" style:font-size-asian="14pt" style:font-size-complex="14pt"/>
    </style:style>
    <style:style style:name="P44" style:parent-style-name="TableContents" style:family="paragraph">
      <style:paragraph-properties fo:text-align="center"/>
    </style:style>
    <style:style style:name="T45" style:parent-style-name="ฟอนต์ของย่อหน้าเริ่มต้น" style:family="text">
      <style:text-properties style:font-name="Angsana New" fo:font-size="14pt" style:font-size-asian="14pt" style:font-size-complex="14pt" style:script-type="complex"/>
    </style:style>
    <style:style style:name="P46" style:parent-style-name="TableContents" style:family="paragraph">
      <style:paragraph-properties fo:text-align="center"/>
    </style:style>
    <style:style style:name="T47" style:parent-style-name="ฟอนต์ของย่อหน้าเริ่มต้น" style:family="text">
      <style:text-properties style:font-name="Angsana New" fo:font-size="14pt" style:font-size-asian="14pt" style:font-size-complex="14pt" style:script-type="complex"/>
    </style:style>
    <style:style style:name="P48" style:parent-style-name="TableContents" style:family="paragraph">
      <style:paragraph-properties fo:text-align="center"/>
    </style:style>
    <style:style style:name="T49" style:parent-style-name="DefaultParagraphFont" style:family="text">
      <style:text-properties style:font-name="Angsana New" fo:font-size="14pt" style:font-size-asian="14pt" style:font-size-complex="14pt" style:script-type="complex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52" style:parent-style-name="DefaultParagraphFont" style:family="text">
      <style:text-properties style:font-name="Angsana New" fo:font-size="14pt" style:font-size-asian="14pt" style:font-size-complex="14pt" style:script-type="complex"/>
    </style:style>
    <style:style style:name="P53" style:parent-style-name="TableContents" style:family="paragraph">
      <style:paragraph-properties fo:text-align="center"/>
    </style:style>
    <style:style style:name="T54" style:parent-style-name="DefaultParagraphFont" style:family="text">
      <style:text-properties style:font-name="Angsana New" fo:font-size="14pt" style:font-size-asian="14pt" style:font-size-complex="14pt" style:script-type="complex"/>
    </style:style>
    <style:style style:name="T55" style:parent-style-name="ฟอนต์ของย่อหน้าเริ่มต้น" style:family="text">
      <style:text-properties style:font-name="Angsana New" fo:font-size="14pt" style:font-size-asian="14pt" style:font-size-complex="14pt"/>
    </style:style>
    <style:style style:name="T56" style:parent-style-name="ฟอนต์ของย่อหน้าเริ่มต้น" style:family="text">
      <style:text-properties style:font-name="Angsana New" fo:font-size="14pt" style:font-size-asian="14pt" style:font-size-complex="14pt"/>
    </style:style>
    <style:style style:name="T57" style:parent-style-name="ฟอนต์ของย่อหน้าเริ่มต้น" style:family="text">
      <style:text-properties style:font-name="Angsana New" fo:font-size="14pt" style:font-size-asian="14pt" style:font-size-complex="14pt" style:script-type="complex"/>
    </style:style>
    <style:style style:name="P58" style:parent-style-name="TableContents" style:family="paragraph">
      <style:paragraph-properties fo:text-align="center"/>
      <style:text-properties style:font-name="Angsana New" fo:font-size="14pt" style:font-size-asian="14pt" style:font-size-complex="14pt"/>
    </style:style>
    <style:style style:name="P59" style:parent-style-name="TableContents" style:family="paragraph">
      <style:paragraph-properties fo:text-align="center"/>
    </style:style>
    <style:style style:name="T60" style:parent-style-name="ฟอนต์ของย่อหน้าเริ่มต้น" style:family="text">
      <style:text-properties style:font-name="Angsana New" fo:font-size="14pt" style:font-size-asian="14pt" style:font-size-complex="14pt" style:script-type="complex"/>
    </style:style>
    <style:style style:name="P61" style:parent-style-name="TableContents" style:family="paragraph">
      <style:paragraph-properties fo:text-align="center"/>
    </style:style>
    <style:style style:name="T62" style:parent-style-name="ฟอนต์ของย่อหน้าเริ่มต้น" style:family="text">
      <style:text-properties style:font-name="Angsana New" fo:font-size="14pt" style:font-size-asian="14pt" style:font-size-complex="14pt" style:script-type="complex"/>
    </style:style>
    <style:style style:name="P63" style:parent-style-name="TableContents" style:family="paragraph">
      <style:paragraph-properties fo:text-align="center"/>
    </style:style>
    <style:style style:name="T64" style:parent-style-name="DefaultParagraphFont" style:family="text">
      <style:text-properties style:font-name="Angsana New" fo:font-size="14pt" style:font-size-asian="14pt" style:font-size-complex="14pt" style:script-type="complex"/>
    </style:style>
    <style:style style:name="P65" style:parent-style-name="Standard" style:family="paragraph">
      <style:paragraph-properties fo:margin-bottom="0.0833in"/>
    </style:style>
    <style:style style:name="T66" style:parent-style-name="ฟอนต์ของย่อหน้าเริ่มต้น" style:family="text">
      <style:text-properties style:font-name="Angsana New" fo:font-size="15pt" style:font-size-asian="15pt" style:font-size-complex="15pt" style:text-underline-type="single" style:text-underline-style="solid" style:text-underline-width="auto" style:text-underline-mode="continuous" style:script-type="complex"/>
    </style:style>
    <style:style style:name="T67" style:parent-style-name="ฟอนต์ของย่อหน้าเริ่มต้น" style:family="text">
      <style:text-properties style:font-name="Angsana New" fo:font-size="15pt" style:font-size-asian="15pt" style:font-size-complex="15pt" style:text-underline-type="single" style:text-underline-style="solid" style:text-underline-width="auto" style:text-underline-mode="continuous" style:script-type="complex"/>
    </style:style>
    <style:style style:name="T68" style:parent-style-name="ฟอนต์ของย่อหน้าเริ่มต้น" style:family="text">
      <style:text-properties style:font-name="Angsana New" fo:font-size="15pt" style:font-size-asian="15pt" style:font-size-complex="15pt"/>
    </style:style>
    <style:style style:name="T69" style:parent-style-name="ฟอนต์ของย่อหน้าเริ่มต้น" style:family="text">
      <style:text-properties style:font-name="Angsana New" fo:font-size="15pt" style:font-size-asian="15pt" style:font-size-complex="15pt"/>
    </style:style>
    <style:style style:name="T70" style:parent-style-name="ฟอนต์ของย่อหน้าเริ่มต้น" style:family="text">
      <style:text-properties style:font-name="Angsana New" fo:font-size="15pt" style:font-size-asian="15pt" style:font-size-complex="15pt" style:script-type="complex"/>
    </style:style>
    <style:style style:name="T71" style:parent-style-name="ฟอนต์ของย่อหน้าเริ่มต้น" style:family="text">
      <style:text-properties style:font-name="Angsana New" fo:font-size="15pt" style:font-size-asian="15pt" style:font-size-complex="15pt" style:script-type="complex"/>
    </style:style>
    <style:style style:name="T72" style:parent-style-name="ฟอนต์ของย่อหน้าเริ่มต้น" style:family="text">
      <style:text-properties style:font-name="Angsana New" fo:font-size="15pt" style:font-size-asian="15pt" style:font-size-complex="15pt" style:script-type="complex"/>
    </style:style>
    <style:style style:name="T73" style:parent-style-name="ฟอนต์ของย่อหน้าเริ่มต้น" style:family="text">
      <style:text-properties style:font-name="Angsana New" fo:font-size="15pt" style:font-size-asian="15pt" style:font-size-complex="15pt" style:script-type="complex"/>
    </style:style>
    <style:style style:name="T74" style:parent-style-name="DefaultParagraphFont" style:family="text">
      <style:text-properties style:font-name="Angsana New" fo:font-weight="bold" style:font-weight-asian="bold" style:font-weight-complex="bold" fo:font-size="15pt" style:font-size-asian="15pt" style:font-size-complex="15pt" style:script-type="complex"/>
    </style:style>
    <style:style style:name="T75" style:parent-style-name="DefaultParagraphFont" style:family="text">
      <style:text-properties style:font-name="Angsana New" fo:font-size="15pt" style:font-size-asian="15pt" style:font-size-complex="15pt" style:script-type="complex"/>
    </style:style>
    <style:style style:name="P76" style:parent-style-name="Standard" style:family="paragraph">
      <style:paragraph-properties fo:margin-bottom="0.0833in"/>
    </style:style>
    <style:style style:name="T77" style:parent-style-name="DefaultParagraphFont" style:family="text">
      <style:text-properties style:font-name="Angsana New" fo:font-size="15pt" style:font-size-asian="15pt" style:font-size-complex="15pt" style:script-type="complex"/>
    </style:style>
    <style:style style:name="P78" style:parent-style-name="TableContents" style:family="paragraph">
      <style:paragraph-properties fo:text-align="center"/>
    </style:style>
    <style:style style:name="T79" style:parent-style-name="ฟอนต์ของย่อหน้าเริ่มต้น" style:family="text">
      <style:text-properties style:font-name="Angsana New" fo:font-size="14pt" style:font-size-asian="14pt" style:font-size-complex="14pt" style:script-type="complex"/>
    </style:style>
    <style:style style:name="T80" style:parent-style-name="ฟอนต์ของย่อหน้าเริ่มต้น" style:family="text">
      <style:text-properties style:font-name="Angsana New" style:font-size-complex="12pt" style:script-type="complex"/>
    </style:style>
    <style:style style:name="T81" style:parent-style-name="DefaultParagraphFont" style:family="text">
      <style:text-properties fo:font-size="11pt" style:font-size-asian="11pt" style:font-size-complex="14pt" style:script-type="complex"/>
    </style:style>
    <style:style style:name="P82" style:parent-style-name="Standard" style:family="paragraph">
      <style:paragraph-properties fo:margin-bottom="0.0833in"/>
    </style:style>
    <style:style style:name="T83" style:parent-style-name="ฟอนต์ของย่อหน้าเริ่มต้น" style:family="text">
      <style:text-properties style:font-name="Angsana New" fo:font-size="15pt" style:font-size-asian="15pt" style:font-size-complex="15pt" style:text-underline-type="single" style:text-underline-style="solid" style:text-underline-width="auto" style:text-underline-mode="continuous" style:script-type="complex"/>
    </style:style>
    <style:style style:name="T84" style:parent-style-name="ฟอนต์ของย่อหน้าเริ่มต้น" style:family="text">
      <style:text-properties style:font-name="Angsana New" fo:font-size="15pt" style:font-size-asian="15pt" style:font-size-complex="15pt" style:text-underline-type="single" style:text-underline-style="solid" style:text-underline-width="auto" style:text-underline-mode="continuous" style:script-type="complex"/>
    </style:style>
    <style:style style:name="T85" style:parent-style-name="ฟอนต์ของย่อหน้าเริ่มต้น" style:family="text">
      <style:text-properties style:font-name="Angsana New" fo:font-size="15pt" style:font-size-asian="15pt" style:font-size-complex="15pt" style:text-underline-type="single" style:text-underline-style="solid" style:text-underline-width="auto" style:text-underline-mode="continuous" style:script-type="complex"/>
    </style:style>
    <style:style style:name="T86" style:parent-style-name="ฟอนต์ของย่อหน้าเริ่มต้น" style:family="text">
      <style:text-properties style:font-name="Angsana New" fo:font-size="15pt" style:font-size-asian="15pt" style:font-size-complex="15pt"/>
    </style:style>
    <style:style style:name="T87" style:parent-style-name="ฟอนต์ของย่อหน้าเริ่มต้น" style:family="text">
      <style:text-properties style:font-name="Angsana New" fo:font-size="15pt" style:font-size-asian="15pt" style:font-size-complex="15pt"/>
    </style:style>
    <style:style style:name="T88" style:parent-style-name="ฟอนต์ของย่อหน้าเริ่มต้น" style:family="text">
      <style:text-properties style:font-name="Angsana New" fo:font-size="15pt" style:font-size-asian="15pt" style:font-size-complex="15pt" style:script-type="complex"/>
    </style:style>
    <style:style style:name="T89" style:parent-style-name="DefaultParagraphFont" style:family="text">
      <style:text-properties style:font-name="Angsana New" fo:font-size="15pt" style:font-size-asian="15pt" style:font-size-complex="15pt" style:script-type="complex"/>
    </style:style>
    <style:style style:name="T90" style:parent-style-name="DefaultParagraphFont" style:family="text">
      <style:text-properties style:font-name="Angsana New" fo:font-size="15pt" style:font-size-asian="15pt" style:font-size-complex="15pt" style:script-type="complex"/>
    </style:style>
    <style:style style:name="P91" style:parent-style-name="Standard" style:family="paragraph">
      <style:paragraph-properties fo:text-align="center" fo:margin-bottom="0.0416in"/>
      <style:text-properties style:font-name="Angsana New" fo:font-size="15pt" style:font-size-asian="15pt" style:font-size-complex="15pt"/>
    </style:style>
    <style:style style:name="P92" style:parent-style-name="Standard" style:family="paragraph">
      <style:paragraph-properties fo:text-align="center" fo:margin-bottom="0.0416in"/>
    </style:style>
    <style:style style:name="T93" style:parent-style-name="DefaultParagraphFont" style:family="text">
      <style:text-properties style:font-name="Angsana New" fo:font-size="15pt" style:font-size-asian="15pt" style:font-size-complex="15pt" style:script-type="complex"/>
    </style:style>
    <style:style style:name="P94" style:parent-style-name="Standard" style:family="paragraph">
      <style:paragraph-properties fo:text-align="center"/>
    </style:style>
    <style:style style:name="T95" style:parent-style-name="ฟอนต์ของย่อหน้าเริ่มต้น" style:family="text">
      <style:text-properties style:font-name="Angsana New" fo:font-size="15pt" style:font-size-asian="15pt" style:font-size-complex="15pt" style:script-type="complex"/>
    </style:style>
    <style:style style:name="P96" style:parent-style-name="Standard" style:family="paragraph">
      <style:paragraph-properties fo:text-align="center"/>
    </style:style>
    <style:style style:name="T97" style:parent-style-name="ฟอนต์ของย่อหน้าเริ่มต้น" style:family="text">
      <style:text-properties style:font-name="Angsana New" fo:font-size="15pt" style:font-size-asian="15pt" style:font-size-complex="15pt" style:script-type="complex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4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7"><draw:g draw:z-index="251665408" draw:name="กลุ่ม 43" draw:id="id3" draw:style-name="a3" text:anchor-type="paragraph"><svg:title/><svg:desc/><draw:frame draw:id="id0" draw:style-name="a0" draw:name="รูปภาพ 36" svg:x="3.42866in" svg:y="-0.13091in" svg:width="1.04426in" svg:height="0.26508in" style:rel-width="scale" style:rel-height="scale"><draw:image xlink:href="media/image1.png" xlink:type="simple" xlink:show="embed" xlink:actuate="onLoad"/><svg:title/><svg:desc/></draw:frame><draw:frame draw:id="id1" draw:style-name="a1" draw:name="กราฟิก 39" svg:x="2.30625in" svg:y="-0.16206in" svg:width="0.92859in" svg:height="0.32739in" style:rel-width="scale" style:rel-height="scale"><draw:image xlink:href="media/image2.svg" xlink:type="simple" xlink:show="embed" xlink:actuate="onLoad"/><svg:title/><svg:desc/></draw:frame><draw:connector draw:type="line" svg:x1="3.31696in" svg:y1="-0.25764in" svg:x2="3.31696in" svg:y2="0.22153in" draw:id="id2" draw:style-name="a2" draw:name="ตัวเชื่อมต่อตรง 41"><svg:title/><svg:desc/></draw:connector></draw:g></text:span></text:p>
      <text:p text:style-name="P8"><text:span text:style-name="T9">ใบขอโอนย้ายพนักงาน</text:span></text:p>
      <text:p text:style-name="Standard"><text:span text:style-name="T10">ส่วนที่ 1 ข้อมูลของพนักงาน</text:span></text:p>
      <text:p text:style-name="Standard"><text:span text:style-name="T11">ชื่อ-สกุลพนักงาน (นาย/นาง/นางสาว)………………………………………………………………………………………..</text:span></text:p>
      <text:p text:style-name="P12"><text:span text:style-name="T13">ตำแหน่งปัจจุบัน………………………………………..……สังกัดแผนก…………………………………..………………ฝ่าย…………………………………………………..……….</text:span></text:p>
      <text:p text:style-name="Standard"><text:span text:style-name="T14">ส่วนที่ 2 วัตถุประสงค์ในการอนุมัติโอนย้ายพนักงาน</text:span></text:p>
      <text:p text:style-name="Standard"><text:span text:style-name="T15">โอนย้ายไปสังกัดแผนก………………………………………………ฝ่าย…………………………………………………...</text:span></text:p>
      <text:p text:style-name="Standard"><text:span text:style-name="T16">ตำแหน่ง………………………………………………………………………………………………………………………</text:span></text:p>
      <text:p text:style-name="Standard"><text:span text:style-name="T17">เหตุผลในการโอนย้าย……………………………………………………………………………………………….</text:span></text:p>
      <text:p text:style-name="Standard"><text:span text:style-name="T18">………………………………………………………………………………………………………………………………..</text:span><text:span text:style-name="T19"><text:line-break/></text:span><text:span text:style-name="T20"><text:s text:c="14"/>ทั้งนี้ให้มีผลบังคับใช้ ในการโอนย้าย ตั้งแต่ วันที่………เดือน……..………………พ.ศ.</text:span><text:span text:style-name="T21"><text:s/></text:span><text:span text:style-name="T22">………..…. เป็นต้นไป</text:span></text:p>
      <text:p text:style-name="P23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<text:span text:style-name="T30">ความคิดเห็นของผู้บังคับบัญชาสังกัดเดิม</text:span></text:p>
          </table:table-cell>
          <table:table-cell table:style-name="TableCell31">
            <text:p text:style-name="P32"><text:span text:style-name="T33">ความคิดเห็นของผู้บังคับบัญชาสังกัดใหม่</text:span></text:p>
          </table:table-cell>
        </table:table-row>
        <table:table-row table:style-name="TableRow34">
          <table:table-cell table:style-name="TableCell35">
            <text:p text:style-name="P36"><text:span text:style-name="T37">….............................................................................................</text:span></text:p>
            <text:p text:style-name="P38"><text:span text:style-name="T39">….............................................................................................</text:span></text:p>
            <text:p text:style-name="TableContents"><text:span text:style-name="T40"><draw:custom-shape svg:x="0.10472in" svg:y="0.07087in" svg:width="0.13542in" svg:height="0.125in" draw:z-index="251658240" draw:id="id4" draw:style-name="a4" draw:name="สี่เหลี่ยมผืนผ้า 1" text:anchor-type="paragraph"><svg:title/><svg:desc/><text:p text:style-name="ปกติ"/><draw:enhanced-geometry draw:type="non-primitive" svg:viewBox="0 0 21600 21600" draw:enhanced-path="M 0 0 L 21600 0 21600 21600 0 21600 Z N"/></draw:custom-shape></text:span><text:span text:style-name="T41"><draw:custom-shape svg:x="1.57362in" svg:y="0.07087in" svg:width="0.13542in" svg:height="0.125in" draw:z-index="251659264" draw:id="id5" draw:style-name="a5" draw:name="สี่เหลี่ยมผืนผ้า 2" text:anchor-type="paragraph"><svg:title/><svg:desc/><text:p text:style-name="ปกติ"/><draw:enhanced-geometry draw:type="non-primitive" svg:viewBox="0 0 21600 21600" draw:enhanced-path="M 0 0 L 21600 0 21600 21600 0 21600 Z N"/></draw:custom-shape></text:span><text:span text:style-name="T42"><text:s text:c="8"/>อนุมัติให้โอนย้าย <text:s text:c="17"/>ไม่อนุมัติให้โอนย้าย</text:span></text:p>
            <text:p text:style-name="P43"/>
            <text:p text:style-name="P44"><text:span text:style-name="T45">ลงชื่อ............................................................</text:span></text:p>
            <text:p text:style-name="P46"><text:span text:style-name="T47">ตำแหน่ง........................................................</text:span></text:p>
            <text:p text:style-name="P48"><text:span text:style-name="T49">…......./........................./….......</text:span></text:p>
          </table:table-cell>
          <table:table-cell table:style-name="TableCell50">
            <text:p text:style-name="P51"><text:span text:style-name="T52">….............................................................................................</text:span></text:p>
            <text:p text:style-name="P53"><text:span text:style-name="T54">….............................................................................................</text:span></text:p>
            <text:p text:style-name="TableContents"><text:span text:style-name="T55"><draw:custom-shape svg:x="0.10472in" svg:y="0.07087in" svg:width="0.13542in" svg:height="0.125in" draw:z-index="2" draw:id="id6" draw:style-name="a6" draw:name="สี่เหลี่ยมผืนผ้า 3" text:anchor-type="paragraph"><svg:title/><svg:desc/><text:p text:style-name="ปกติ"/><draw:enhanced-geometry draw:type="non-primitive" svg:viewBox="0 0 21600 21600" draw:enhanced-path="M 0 0 L 21600 0 21600 21600 0 21600 Z N"/></draw:custom-shape></text:span><text:span text:style-name="T56"><draw:custom-shape svg:x="1.57362in" svg:y="0.07087in" svg:width="0.13542in" svg:height="0.125in" draw:z-index="3" draw:id="id7" draw:style-name="a7" draw:name="สี่เหลี่ยมผืนผ้า 4" text:anchor-type="paragraph"><svg:title/><svg:desc/><text:p text:style-name="ปกติ"/><draw:enhanced-geometry draw:type="non-primitive" svg:viewBox="0 0 21600 21600" draw:enhanced-path="M 0 0 L 21600 0 21600 21600 0 21600 Z N"/></draw:custom-shape></text:span><text:span text:style-name="T57"><text:s text:c="9"/>อนุมัติให้โอนย้าย <text:s text:c="16"/>ไม่อนุมัติให้โอนย้าย</text:span></text:p>
            <text:p text:style-name="P58"/>
            <text:p text:style-name="P59"><text:span text:style-name="T60">ลงชื่อ............................................................</text:span></text:p>
            <text:p text:style-name="P61"><text:span text:style-name="T62">ตำแหน่ง........................................................</text:span></text:p>
            <text:p text:style-name="P63"><text:span text:style-name="T64">…......./........................./….......</text:span></text:p>
          </table:table-cell>
        </table:table-row>
      </table:table>
      <text:p text:style-name="P65"><text:span text:style-name="T66">ส่วนที่ 3 สำหรับ</text:span><text:span text:style-name="T67">พนักงาน</text:span></text:p>
      <text:p text:style-name="Standard"><text:span text:style-name="T68"><draw:custom-shape svg:x="2.16732in" svg:y="0.07087in" svg:width="0.13542in" svg:height="0.125in" draw:z-index="251668480" draw:id="id8" draw:style-name="a8" draw:name="สี่เหลี่ยมผืนผ้า 5" text:anchor-type="paragraph"><svg:title/><svg:desc/><text:p text:style-name="ปกติ"/><draw:enhanced-geometry draw:type="non-primitive" svg:viewBox="0 0 21600 21600" draw:enhanced-path="M 0 0 L 21600 0 21600 21600 0 21600 Z N"/></draw:custom-shape></text:span><text:span text:style-name="T69"><draw:custom-shape svg:x="0.35472in" svg:y="0.07087in" svg:width="0.13542in" svg:height="0.125in" draw:z-index="251667456" draw:id="id9" draw:style-name="a9" draw:name="สี่เหลี่ยมผืนผ้า 6" text:anchor-type="paragraph"><svg:title/><svg:desc/><text:p text:style-name="ปกติ"/><draw:enhanced-geometry draw:type="non-primitive" svg:viewBox="0 0 21600 21600" draw:enhanced-path="M 0 0 L 21600 0 21600 21600 0 21600 Z N"/></draw:custom-shape></text:span><text:span text:style-name="T70"><text:s text:c="16"/></text:span><text:span text:style-name="T71">ยอมรับตำแหน่งใหม่</text:span><text:span text:style-name="T72"><text:s text:c="20"/></text:span><text:span text:style-name="T73">ไม่ประสงค์ทำงานในตำแหน่งใหม่</text:span></text:p>
      <text:p text:style-name="Standard"><text:span text:style-name="T74">เหตุผล<text:s/></text:span><text:span text:style-name="T75">....................................................................................................................................................................................</text:span></text:p>
      <text:p text:style-name="P76"><text:span text:style-name="T77">…..............................................................................................................................................................................................</text:span></text:p>
      <text:p text:style-name="P78"><text:span text:style-name="T79">ลงชื่อ...........................................................</text:span><text:span text:style-name="T80">.</text:span><text:span text:style-name="T81">พนักงาน</text:span></text:p>
      <text:p text:style-name="P82"><text:span text:style-name="T83">ส่วนที่<text:s/></text:span><text:span text:style-name="T84">4</text:span><text:span text:style-name="T85"><text:s/>สำหรับกรรมการผู้จัดการ</text:span></text:p>
      <text:p text:style-name="Standard"><text:span text:style-name="T86"><draw:custom-shape svg:x="2.16732in" svg:y="0.07087in" svg:width="0.13542in" svg:height="0.125in" draw:z-index="5" draw:id="id10" draw:style-name="a10" draw:name="สี่เหลี่ยมผืนผ้า 5" text:anchor-type="paragraph"><svg:title/><svg:desc/><text:p text:style-name="ปกติ"/><draw:enhanced-geometry draw:type="non-primitive" svg:viewBox="0 0 21600 21600" draw:enhanced-path="M 0 0 L 21600 0 21600 21600 0 21600 Z N"/></draw:custom-shape></text:span><text:span text:style-name="T87"><draw:custom-shape svg:x="0.35472in" svg:y="0.07087in" svg:width="0.13542in" svg:height="0.125in" draw:z-index="4" draw:id="id11" draw:style-name="a11" draw:name="สี่เหลี่ยมผืนผ้า 6" text:anchor-type="paragraph"><svg:title/><svg:desc/><text:p text:style-name="ปกติ"/><draw:enhanced-geometry draw:type="non-primitive" svg:viewBox="0 0 21600 21600" draw:enhanced-path="M 0 0 L 21600 0 21600 21600 0 21600 Z N"/></draw:custom-shape></text:span><text:span text:style-name="T88"><text:s text:c="16"/>อนุมัติตามเสนอ <text:s text:c="27"/>ไม่อนุมัติตามเสนอ</text:span></text:p>
      <text:p text:style-name="Standard"><text:span text:style-name="T89">…..............................................................................................................................................................................................</text:span></text:p>
      <text:p text:style-name="Standard"><text:span text:style-name="T90">…..............................................................................................................................................................................................</text:span></text:p>
      <text:p text:style-name="P91"/>
      <text:p text:style-name="P92"><text:span text:style-name="T93">………………………………………….</text:span></text:p>
      <text:p text:style-name="P94"><text:span text:style-name="T95">(…………………………………….)</text:span></text:p>
      <text:p text:style-name="P96"><text:span text:style-name="T97">กรรมการผู้จัดการ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Angsana New" svg:font-family="Angsana New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Angsan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6pt" fo:background-color="transparent" style:text-underline-type="none" style:text-underline-color="font-color" style:text-emphasize="none" fo:language="en" fo:country="US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ปกติ" style:display-name="ปกติ" style:family="paragraph">
      <style:text-properties fo:hyphenate="false"/>
    </style:style>
    <style:style style:name="ฟอนต์ของย่อหน้าเริ่มต้น" style:display-name="ฟอนต์ของย่อหน้าเริ่มต้น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8.5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รายการ" style:display-name="รายการ" style:family="paragraph" style:parent-style-name="Textbody">
      <style:text-properties fo:hyphenate="false"/>
    </style:style>
    <style:style style:name="คำอธิบายภาพ" style:display-name="คำอธิบายภาพ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2041in"/>
      </style:footer-style>
    </style:page-layout>
    <style:style style:name="T2" style:parent-style-name="DefaultParagraphFont" style:family="text">
      <style:text-properties style:font-size-complex="12pt" style:script-type="complex"/>
    </style:style>
    <style:style style:name="T3" style:parent-style-name="DefaultParagraphFont" style:family="text">
      <style:text-properties style:font-size-complex="12pt" style:script-type="complex"/>
    </style:style>
    <style:style style:name="T4" style:parent-style-name="DefaultParagraphFont" style:family="text">
      <style:text-properties style:font-size-complex="12pt" style:script-type="complex"/>
    </style:style>
    <style:style style:name="T5" style:parent-style-name="DefaultParagraphFont" style:family="text">
      <style:text-properties style:font-size-complex="12pt" style:script-type="complex"/>
    </style:style>
    <style:style style:name="T6" style:parent-style-name="DefaultParagraphFont" style:family="text">
      <style:text-properties style:font-size-complex="12pt" style:script-type="complex"/>
    </style:style>
  </office:automatic-styles>
  <office:master-styles>
    <style:master-page style:name="MP0" style:page-layout-name="PL0">
      <style:footer>
        <text:p text:style-name="Footer">Issue date 01<text:span text:style-name="T2">-</text:span>03<text:span text:style-name="T3">-</text:span>68<text:tab/>Internal use<text:tab/>FM<text:span text:style-name="T4">-</text:span>HR<text:span text:style-name="T5">-</text:span>14 Rev<text:s/><text:span text:style-name="T6">:<text:s/></text:span>0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SUS</meta:initial-creator>
    <dc:creator>WIN 10</dc:creator>
    <meta:creation-date>2025-02-11T06:36:00Z</meta:creation-date>
    <dc:date>2025-08-30T09:24:00Z</dc:date>
    <meta:print-date>2025-08-30T09:23:00Z</meta:print-date>
    <meta:template xlink:href="Normal" xlink:type="simple"/>
    <meta:editing-cycles>8</meta:editing-cycles>
    <meta:editing-duration>PT3300S</meta:editing-duration>
    <meta:user-defined meta:name="Info 1"/>
    <meta:user-defined meta:name="Info 2"/>
    <meta:user-defined meta:name="Info 3"/>
    <meta:user-defined meta:name="Info 4"/>
    <meta:document-statistic meta:page-count="1" meta:paragraph-count="5" meta:word-count="395" meta:character-count="2642" meta:row-count="18" meta:non-whitespace-character-count="2252"/>
  </office:meta>
</office:document-meta>
</file>